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6A8F28B7.png" manifest:media-type="image/png"/>
  <manifest:file-entry manifest:full-path="Pictures/1000000100000100000001009252EAE6.png" manifest:media-type="image/png"/>
  <manifest:file-entry manifest:full-path="Pictures/1000000100000100000001000827CB5C.png" manifest:media-type="image/png"/>
  <manifest:file-entry manifest:full-path="Pictures/10000001000001000000010001967A70.png" manifest:media-type="image/png"/>
  <manifest:file-entry manifest:full-path="Pictures/10000001000001000000010077E01269.png" manifest:media-type="image/png"/>
  <manifest:file-entry manifest:full-path="Pictures/10000001000001000000010049B145FE.png" manifest:media-type="image/png"/>
  <manifest:file-entry manifest:full-path="Pictures/10000001000001000000010009B0A67E.png" manifest:media-type="image/png"/>
  <manifest:file-entry manifest:full-path="Pictures/10000001000001000000010031F0CE6A.png" manifest:media-type="image/png"/>
  <manifest:file-entry manifest:full-path="Pictures/10000001000001000000010051733180.png" manifest:media-type="image/png"/>
  <manifest:file-entry manifest:full-path="Pictures/1000000100000100000001009D680981.png" manifest:media-type="image/png"/>
  <manifest:file-entry manifest:full-path="Pictures/100000010000010000000100433D5215.png" manifest:media-type="image/png"/>
  <manifest:file-entry manifest:full-path="Pictures/100000010000010000000100AF82A5C8.png" manifest:media-type="image/png"/>
  <manifest:file-entry manifest:full-path="Pictures/100000010000010000000100CF40806F.png" manifest:media-type="image/png"/>
  <manifest:file-entry manifest:full-path="Pictures/100000010000010000000100B887DD94.png" manifest:media-type="image/png"/>
  <manifest:file-entry manifest:full-path="Pictures/100000010000010000000100C1B66118.png" manifest:media-type="image/png"/>
  <manifest:file-entry manifest:full-path="Pictures/1000000100000100000001004C96EA54.png" manifest:media-type="image/png"/>
  <manifest:file-entry manifest:full-path="Pictures/10000001000001000000010013230697.png" manifest:media-type="image/png"/>
  <manifest:file-entry manifest:full-path="Pictures/100000010000010000000100B577FD80.png" manifest:media-type="image/png"/>
  <manifest:file-entry manifest:full-path="Pictures/100000010000010000000100F3AFA451.png" manifest:media-type="image/png"/>
  <manifest:file-entry manifest:full-path="Pictures/100000010000010000000100849B506B.png" manifest:media-type="image/png"/>
  <manifest:file-entry manifest:full-path="Pictures/1000000100000100000001001F61B6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2a4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1f5f9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1a3a5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a3a5c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none" svg:stroke-width="0cm" draw:fill="solid" draw:fill-color="#0f2a4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fef3c7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ecfdf5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solid" draw:fill-color="#0a1f3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solid" draw:fill-color="#b4530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1a2e1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>
      <style:graphic-properties draw:stroke="none" svg:stroke-width="0cm" draw:fill="solid" draw:fill-color="#2d4a6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solid" draw:fill-color="#64748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solid" draw:fill-color="#0f1f3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>
      <style:graphic-properties draw:stroke="none" svg:stroke-width="0cm" draw:fill="solid" draw:fill-color="#7c3ae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>
      <style:graphic-properties draw:stroke="none" svg:stroke-width="0cm" draw:fill="solid" draw:fill-color="#1a103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solid" draw:fill-color="#eff6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>
      <style:graphic-properties draw:stroke="none" svg:stroke-width="0cm" draw:fill="solid" draw:fill-color="#fdf2f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>
      <style:graphic-properties draw:stroke="none" svg:stroke-width="0cm" draw:fill="solid" draw:fill-color="#0f172a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99" style:family="graphic" style:parent-style-name="standard">
      <style:graphic-properties draw:stroke="none" svg:stroke-width="0cm" draw:fill="solid" draw:fill-color="#1e293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0" style:family="graphic" style:parent-style-name="standard">
      <style:graphic-properties draw:stroke="none" svg:stroke-width="0cm" draw:fill="solid" draw:fill-color="#ef44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1" style:family="graphic" style:parent-style-name="standard">
      <style:graphic-properties draw:stroke="none" svg:stroke-width="0cm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>
      <style:graphic-properties draw:stroke="none" svg:stroke-width="0cm" draw:fill="solid" draw:fill-color="#22c55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>
      <style:graphic-properties draw:stroke="none" svg:stroke-width="0cm" draw:fill="solid" draw:fill-color="#eef4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1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>
      <style:graphic-properties draw:stroke="none" svg:stroke-width="0cm" draw:fill="solid" draw:fill-color="#0d6e6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>
      <style:graphic-properties draw:stroke="none" svg:stroke-width="0cm" draw:fill="solid" draw:fill-color="#1d4a7a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1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>
      <style:graphic-properties draw:stroke="none" svg:stroke-width="0cm" draw:fill="solid" draw:fill-color="#3d2b6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8" style:family="graphic" style:parent-style-name="standard">
      <style:graphic-properties draw:stroke="none" svg:stroke-width="0cm" draw:fill="solid" draw:fill-color="#fff7ed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0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1" style:family="graphic" style:parent-style-name="standard">
      <style:graphic-properties draw:stroke="none" svg:stroke-width="0cm" draw:fill="solid" draw:fill-color="#f5f3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5%" loext:shadow-blur="0.282cm" loext:decorative="false"/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d9488"/>
      <style:paragraph-properties fo:text-align="start"/>
      <style:text-properties fo:font-size="18pt"/>
    </style:style>
    <style:style style:name="P2" style:family="paragraph">
      <loext:graphic-properties draw:fill="solid" draw:fill-color="#1a3a5c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solid" draw:fill-color="#0f2a4a"/>
      <style:paragraph-properties fo:text-align="start"/>
      <style:text-properties fo:font-size="18pt"/>
    </style:style>
    <style:style style:name="P14" style:family="paragraph">
      <loext:graphic-properties draw:fill="solid" draw:fill-color="#fef3c7"/>
      <style:paragraph-properties fo:text-align="start"/>
      <style:text-properties fo:font-size="18pt"/>
    </style:style>
    <style:style style:name="P15" style:family="paragraph">
      <loext:graphic-properties draw:fill="solid" draw:fill-color="#ecfdf5"/>
      <style:paragraph-properties fo:text-align="start"/>
      <style:text-properties fo:font-size="18pt"/>
    </style:style>
    <style:style style:name="P16" style:family="paragraph">
      <loext:graphic-properties draw:fill="solid" draw:fill-color="#0a1f38"/>
      <style:paragraph-properties fo:text-align="start"/>
      <style:text-properties fo:font-size="18pt"/>
    </style:style>
    <style:style style:name="P17" style:family="paragraph">
      <loext:graphic-properties draw:fill="solid" draw:fill-color="#b45309"/>
      <style:paragraph-properties fo:text-align="start"/>
      <style:text-properties fo:font-size="18pt"/>
    </style:style>
    <style:style style:name="P18" style:family="paragraph">
      <loext:graphic-properties draw:fill="solid" draw:fill-color="#1a2e1a"/>
      <style:paragraph-properties fo:text-align="start"/>
      <style:text-properties fo:font-size="18pt"/>
    </style:style>
    <style:style style:name="P19" style:family="paragraph">
      <loext:graphic-properties draw:fill="solid" draw:fill-color="#2d4a6b"/>
      <style:paragraph-properties fo:text-align="start"/>
      <style:text-properties fo:font-size="18pt"/>
    </style:style>
    <style:style style:name="P20" style:family="paragraph">
      <loext:graphic-properties draw:fill="solid" draw:fill-color="#64748b"/>
      <style:paragraph-properties fo:text-align="start"/>
      <style:text-properties fo:font-size="18pt"/>
    </style:style>
    <style:style style:name="P21" style:family="paragraph">
      <loext:graphic-properties draw:fill="solid" draw:fill-color="#0f1f38"/>
      <style:paragraph-properties fo:text-align="start"/>
      <style:text-properties fo:font-size="18pt"/>
    </style:style>
    <style:style style:name="P22" style:family="paragraph">
      <loext:graphic-properties draw:fill="solid" draw:fill-color="#7c3aed"/>
      <style:paragraph-properties fo:text-align="start"/>
      <style:text-properties fo:font-size="18pt"/>
    </style:style>
    <style:style style:name="P23" style:family="paragraph">
      <loext:graphic-properties draw:fill="solid" draw:fill-color="#1a1035"/>
      <style:paragraph-properties fo:text-align="start"/>
      <style:text-properties fo:font-size="18pt"/>
    </style:style>
    <style:style style:name="P24" style:family="paragraph">
      <loext:graphic-properties draw:fill="solid" draw:fill-color="#eff6ff"/>
      <style:paragraph-properties fo:text-align="start"/>
      <style:text-properties fo:font-size="18pt"/>
    </style:style>
    <style:style style:name="P25" style:family="paragraph">
      <loext:graphic-properties draw:fill="solid" draw:fill-color="#fdf2f8"/>
      <style:paragraph-properties fo:text-align="start"/>
      <style:text-properties fo:font-size="18pt"/>
    </style:style>
    <style:style style:name="P26" style:family="paragraph">
      <loext:graphic-properties draw:fill="solid" draw:fill-color="#0f172a"/>
      <style:paragraph-properties fo:text-align="start"/>
      <style:text-properties fo:font-size="18pt"/>
    </style:style>
    <style:style style:name="P27" style:family="paragraph">
      <loext:graphic-properties draw:fill="solid" draw:fill-color="#1e293b"/>
      <style:paragraph-properties fo:text-align="start"/>
      <style:text-properties fo:font-size="18pt"/>
    </style:style>
    <style:style style:name="P28" style:family="paragraph">
      <loext:graphic-properties draw:fill="solid" draw:fill-color="#ef4444"/>
      <style:paragraph-properties fo:text-align="start"/>
      <style:text-properties fo:font-size="18pt"/>
    </style:style>
    <style:style style:name="P29" style:family="paragraph">
      <loext:graphic-properties draw:fill="solid" draw:fill-color="#f59e0b"/>
      <style:paragraph-properties fo:text-align="start"/>
      <style:text-properties fo:font-size="18pt"/>
    </style:style>
    <style:style style:name="P30" style:family="paragraph">
      <loext:graphic-properties draw:fill="solid" draw:fill-color="#22c55e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solid" draw:fill-color="#eef4ff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5" style:family="paragraph">
      <loext:graphic-properties draw:fill="solid" draw:fill-color="#0d6e6e"/>
      <style:paragraph-properties fo:text-align="start"/>
      <style:text-properties fo:font-size="18pt"/>
    </style:style>
    <style:style style:name="P36" style:family="paragraph">
      <loext:graphic-properties draw:fill="solid" draw:fill-color="#1d4a7a"/>
      <style:paragraph-properties fo:text-align="start"/>
      <style:text-properties fo:font-size="18pt"/>
    </style:style>
    <style:style style:name="P37" style:family="paragraph">
      <loext:graphic-properties draw:fill="solid" draw:fill-color="#3d2b6e"/>
      <style:paragraph-properties fo:text-align="start"/>
      <style:text-properties fo:font-size="18pt"/>
    </style:style>
    <style:style style:name="P38" style:family="paragraph">
      <loext:graphic-properties draw:fill="solid" draw:fill-color="#fff7ed"/>
      <style:paragraph-properties fo:text-align="start"/>
      <style:text-properties fo:font-size="18pt"/>
    </style:style>
    <style:style style:name="P39" style:family="paragraph">
      <loext:graphic-properties draw:fill="solid" draw:fill-color="#f5f3ff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f2a4a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variant="normal" fo:text-transform="none" fo:color="#92400e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65f4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1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2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color="#2d4a6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variant="normal" fo:text-transform="none" fo:color="#0f2a4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font-variant="normal" fo:text-transform="none" fo:color="#92400e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T27" style:family="text">
      <style:text-properties fo:font-variant="normal" fo:text-transform="none" fo:color="#1e40a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font-variant="normal" fo:text-transform="none" fo:color="#83184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variant="normal" fo:text-transform="none" fo:color="#065f4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3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2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3" style:family="text">
      <style:text-properties fo:font-variant="normal" fo:text-transform="none" fo:color="#60a5fa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4" style:family="text">
      <style:text-properties fo:font-variant="normal" fo:text-transform="none" fo:color="#86efac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5" style:family="text">
      <style:text-properties fo:font-variant="normal" fo:text-transform="none" fo:color="#f87171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6" style:family="text">
      <style:text-properties fo:font-variant="normal" fo:text-transform="none" fo:color="#4ade80" loext:opacity="100%" style:text-outline="false" style:text-line-through-style="none" style:text-line-through-type="none" style:text-position="0% 100%" style:font-name="Consolas" fo:font-size="8pt" fo:letter-spacing="normal" fo:language="en" fo:country="US" fo:font-style="normal" style:text-underline-style="none" fo:font-weight="normal" fo:background-color="transparent" style:font-name-asian="Consolas1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f2a4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4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0f2a4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65f4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65f46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f2a4a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font-variant="normal" fo:text-transform="none" fo:color="#065f4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variant="normal" fo:text-transform="none" fo:color="#1e40af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9a3412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5b21b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2a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240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65f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a78b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d4a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e40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831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41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9a34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5b21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456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6.349cm" svg:height="3.555cm" svg:x="19.05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2.539cm" svg:height="2.539cm" svg:x="19.558cm" svg:y="0.254cm">
          <draw:image xlink:href="Pictures/10000001000001000000010009B0A67E.png" xlink:type="simple" xlink:show="embed" xlink:actuate="onLoad" draw:mime-type="image/png">
            <text:p/>
          </draw:image>
          <svg:desc>preencoded.png</svg:desc>
        </draw:frame>
        <draw:custom-shape draw:name="Shape 2" draw:style-name="gr1" draw:text-style-name="P1" draw:layer="layout" svg:width="6.603cm" svg:height="0.964cm" svg:x="1.143cm" svg:y="1.1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5" draw:layer="layout" svg:width="6.603cm" svg:height="0.964cm" svg:x="1.143cm" svg:y="1.143cm">
          <text:p text:style-name="P4"><text:span text:style-name="T1"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7" draw:layer="layout" svg:width="17.779cm" svg:height="4.063cm" svg:x="1.143cm" svg:y="2.667cm">
          <text:p text:style-name="P6"><text:span text:style-name="T2">Hệ Thống AI Agent</text:span></text:p>
          <text:p text:style-name="P6"><text:span text:style-name="T2">Xử Lý &amp; Truy Xuất Dữ Liệ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7" draw:layer="layout" svg:width="19.049cm" svg:height="1.396cm" svg:x="1.143cm" svg:y="6.985cm">
          <text:p text:style-name="P6"><text:span text:style-name="T3">Vincom Retail – Giải pháp tối ưu hoá quy trình data cho nhiều phòng b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" draw:text-style-name="P2" draw:layer="layout" svg:width="7.492cm" svg:height="1.65cm" svg:x="1.143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964cm" svg:height="0.964cm" svg:x="1.448cm" svg:y="9.271cm">
          <draw:image xlink:href="Pictures/10000001000001000000010031F0CE6A.png" xlink:type="simple" xlink:show="embed" xlink:actuate="onLoad" draw:mime-type="image/png">
            <text:p/>
          </draw:image>
          <svg:desc>preencoded.png</svg:desc>
        </draw:frame>
        <draw:custom-shape draw:name="Text 7" draw:style-name="gr8" draw:text-style-name="P7" draw:layer="layout" svg:width="5.841cm" svg:height="1.523cm" svg:x="2.616cm" svg:y="9.093cm">
          <text:p text:style-name="P6"><text:span text:style-name="T4">Multi-Platform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7" draw:text-style-name="P2" draw:layer="layout" svg:width="7.492cm" svg:height="1.65cm" svg:x="9.144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964cm" svg:height="0.964cm" svg:x="9.449cm" svg:y="9.271cm">
          <draw:image xlink:href="Pictures/100000010000010000000100433D5215.png" xlink:type="simple" xlink:show="embed" xlink:actuate="onLoad" draw:mime-type="image/png">
            <text:p/>
          </draw:image>
          <svg:desc>preencoded.png</svg:desc>
        </draw:frame>
        <draw:custom-shape draw:name="Text 9" draw:style-name="gr9" draw:text-style-name="P7" draw:layer="layout" svg:width="5.841cm" svg:height="1.523cm" svg:x="10.617cm" svg:y="9.093cm">
          <text:p text:style-name="P6"><text:span text:style-name="T4">Auto Debug &amp; 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" draw:text-style-name="P2" draw:layer="layout" svg:width="7.492cm" svg:height="1.65cm" svg:x="17.145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964cm" svg:height="0.964cm" svg:x="17.45cm" svg:y="9.271cm">
          <draw:image xlink:href="Pictures/1000000100000100000001009D680981.png" xlink:type="simple" xlink:show="embed" xlink:actuate="onLoad" draw:mime-type="image/png">
            <text:p/>
          </draw:image>
          <svg:desc>preencoded.png</svg:desc>
        </draw:frame>
        <draw:custom-shape draw:name="Text 11" draw:style-name="gr10" draw:text-style-name="P7" draw:layer="layout" svg:width="5.841cm" svg:height="1.523cm" svg:x="18.618cm" svg:y="9.093cm">
          <text:p text:style-name="P6"><text:span text:style-name="T4">CSV /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23.113cm" svg:height="0.05cm" svg:x="1.143cm" svg:y="11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" draw:text-style-name="P7" draw:layer="layout" svg:width="23.113cm" svg:height="1.015cm" svg:x="1.143cm" svg:y="11.684cm">
          <text:p text:style-name="P6"><text:span text:style-name="T5">Vincom Retail <text:s/>· <text:s/>2026 <text:s/>· <text:s/>Confid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" draw:text-style-name="P9" draw:layer="layout" svg:width="2.539cm" svg:height="1.015cm" svg:x="21.59cm" svg:y="11.684cm">
          <text:p text:style-name="P8"><text:span text:style-name="T5">v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4" draw:text-style-name="P13" draw:layer="layout" svg:width="25.399cm" svg:height="2.79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889cm" svg:y="0.559cm">
          <draw:image xlink:href="Pictures/100000010000010000000100F3AFA451.png" xlink:type="simple" xlink:show="embed" xlink:actuate="onLoad" draw:mime-type="image/png">
            <text:p/>
          </draw:image>
          <svg:desc>preencoded.png</svg:desc>
        </draw:frame>
        <draw:custom-shape draw:name="Text 1" draw:style-name="gr15" draw:text-style-name="P7" draw:layer="layout" svg:width="15.239cm" svg:height="2.158cm" svg:x="2.794cm" svg:y="0.305cm">
          <text:p text:style-name="P6"><text:span text:style-name="T7">Enterprise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" draw:text-style-name="P5" draw:layer="layout" svg:width="2.285cm" svg:height="2.285cm" svg:x="22.352cm" svg:y="0.254cm">
          <text:p text:style-name="P4"><text:span text:style-name="T8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7" draw:text-style-name="P2" draw:layer="layout" svg:width="5.587cm" svg:height="2.285cm" svg:x="0.635cm" svg:y="3.1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5" draw:layer="layout" svg:width="5.587cm" svg:height="1.066cm" svg:x="0.635cm" svg:y="3.251cm">
          <text:p text:style-name="P4"><text:span text:style-name="T9">Vincom 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5" draw:layer="layout" svg:width="5.587cm" svg:height="1.117cm" svg:x="0.635cm" svg:y="4.267cm">
          <text:p text:style-name="P4"><text:span text:style-name="T10">Cao cấp, trung tâm 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" draw:text-style-name="P2" draw:layer="layout" svg:width="5.587cm" svg:height="2.285cm" svg:x="6.655cm" svg:y="3.1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" draw:text-style-name="P5" draw:layer="layout" svg:width="5.587cm" svg:height="1.066cm" svg:x="6.655cm" svg:y="3.251cm">
          <text:p text:style-name="P4"><text:span text:style-name="T9">Vincom Mega M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" draw:text-style-name="P5" draw:layer="layout" svg:width="5.587cm" svg:height="1.117cm" svg:x="6.655cm" svg:y="4.267cm">
          <text:p text:style-name="P4"><text:span text:style-name="T10">All-in-one, quy mô lớ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" draw:text-style-name="P2" draw:layer="layout" svg:width="5.587cm" svg:height="2.285cm" svg:x="12.675cm" svg:y="3.1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" draw:text-style-name="P5" draw:layer="layout" svg:width="5.587cm" svg:height="1.066cm" svg:x="12.675cm" svg:y="3.251cm">
          <text:p text:style-name="P4"><text:span text:style-name="T9">Vincom Pla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" draw:text-style-name="P5" draw:layer="layout" svg:width="5.587cm" svg:height="1.117cm" svg:x="12.675cm" svg:y="4.267cm">
          <text:p text:style-name="P4"><text:span text:style-name="T10">Phổ thông, tỉnh thàn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2" draw:layer="layout" svg:width="5.587cm" svg:height="2.285cm" svg:x="18.694cm" svg:y="3.1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3" draw:text-style-name="P5" draw:layer="layout" svg:width="5.587cm" svg:height="1.066cm" svg:x="18.694cm" svg:y="3.251cm">
          <text:p text:style-name="P4"><text:span text:style-name="T9">Vincom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4" draw:text-style-name="P5" draw:layer="layout" svg:width="5.587cm" svg:height="1.117cm" svg:x="18.694cm" svg:y="4.267cm">
          <text:p text:style-name="P4"><text:span text:style-name="T10">Khu dân cư tiện í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5" draw:text-style-name="P7" draw:layer="layout" svg:width="11.175cm" svg:height="1.066cm" svg:x="0.635cm" svg:y="5.969cm">
          <text:p text:style-name="P6"><text:span text:style-name="T11">Pain Points Hiện Tạ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888cm" svg:height="0.888cm" svg:x="0.711cm" svg:y="7.417cm">
          <draw:image xlink:href="Pictures/100000010000010000000100AF82A5C8.png" xlink:type="simple" xlink:show="embed" xlink:actuate="onLoad" draw:mime-type="image/png">
            <text:p/>
          </draw:image>
          <svg:desc>preencoded.png</svg:desc>
        </draw:frame>
        <draw:custom-shape draw:name="Shape 16" draw:style-name="gr26" draw:text-style-name="P14" draw:layer="layout" svg:width="10.159cm" svg:height="1.269cm" svg:x="1.905cm" svg:y="7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7" draw:text-style-name="P7" draw:layer="layout" svg:width="9.651cm" svg:height="1.167cm" svg:x="2.159cm" svg:y="7.29cm">
          <text:p text:style-name="P6"><text:span text:style-name="T12">Mỗi báo cáo cần DA + DE phối hợp thủ cô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888cm" svg:height="0.888cm" svg:x="0.711cm" svg:y="8.992cm">
          <draw:image xlink:href="Pictures/100000010000010000000100AF82A5C8.png" xlink:type="simple" xlink:show="embed" xlink:actuate="onLoad" draw:mime-type="image/png">
            <text:p/>
          </draw:image>
          <svg:desc>preencoded.png</svg:desc>
        </draw:frame>
        <draw:custom-shape draw:name="Shape 18" draw:style-name="gr26" draw:text-style-name="P14" draw:layer="layout" svg:width="10.159cm" svg:height="1.269cm" svg:x="1.905cm" svg:y="8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8" draw:text-style-name="P7" draw:layer="layout" svg:width="9.651cm" svg:height="1.167cm" svg:x="2.159cm" svg:y="8.865cm">
          <text:p text:style-name="P6"><text:span text:style-name="T12">DA/DE phục vụ nhiều phòng ban đồng thời → bottlen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888cm" svg:height="0.888cm" svg:x="0.711cm" svg:y="10.566cm">
          <draw:image xlink:href="Pictures/100000010000010000000100AF82A5C8.png" xlink:type="simple" xlink:show="embed" xlink:actuate="onLoad" draw:mime-type="image/png">
            <text:p/>
          </draw:image>
          <svg:desc>preencoded.png</svg:desc>
        </draw:frame>
        <draw:custom-shape draw:name="Shape 20" draw:style-name="gr26" draw:text-style-name="P14" draw:layer="layout" svg:width="10.159cm" svg:height="1.269cm" svg:x="1.905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9" draw:text-style-name="P7" draw:layer="layout" svg:width="9.651cm" svg:height="1.167cm" svg:x="2.159cm" svg:y="10.439cm">
          <text:p text:style-name="P6"><text:span text:style-name="T12">Các web/tool chỉ hỗ trợ fields &amp; filter cố địn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0" draw:text-style-name="P7" draw:layer="layout" svg:width="11.429cm" svg:height="1.066cm" svg:x="12.954cm" svg:y="5.969cm">
          <text:p text:style-name="P6"><text:span text:style-name="T11">Giải Pháp Đề Xuấ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888cm" svg:height="0.888cm" svg:x="13.081cm" svg:y="7.315cm">
          <draw:image xlink:href="Pictures/10000001000001000000010031F0CE6A.png" xlink:type="simple" xlink:show="embed" xlink:actuate="onLoad" draw:mime-type="image/png">
            <text:p/>
          </draw:image>
          <svg:desc>preencoded.png</svg:desc>
        </draw:frame>
        <draw:custom-shape draw:name="Shape 23" draw:style-name="gr31" draw:text-style-name="P15" draw:layer="layout" svg:width="10.159cm" svg:height="1.269cm" svg:x="14.275cm" svg:y="7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" draw:text-style-name="P7" draw:layer="layout" svg:width="9.651cm" svg:height="1.167cm" svg:x="14.529cm" svg:y="7.29cm">
          <text:p text:style-name="P6"><text:span text:style-name="T13">Agent kết nối multi-platform API tự độ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888cm" svg:height="0.888cm" svg:x="13.081cm" svg:y="8.89cm">
          <draw:image xlink:href="Pictures/100000010000010000000100433D5215.png" xlink:type="simple" xlink:show="embed" xlink:actuate="onLoad" draw:mime-type="image/png">
            <text:p/>
          </draw:image>
          <svg:desc>preencoded.png</svg:desc>
        </draw:frame>
        <draw:custom-shape draw:name="Shape 25" draw:style-name="gr31" draw:text-style-name="P15" draw:layer="layout" svg:width="10.159cm" svg:height="1.269cm" svg:x="14.275cm" svg:y="8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3" draw:text-style-name="P7" draw:layer="layout" svg:width="9.651cm" svg:height="1.167cm" svg:x="14.529cm" svg:y="8.865cm">
          <text:p text:style-name="P6"><text:span text:style-name="T13">Auto debug: Field Mismatch, Payload lỗi, Schema s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0.888cm" svg:height="0.888cm" svg:x="13.081cm" svg:y="10.465cm">
          <draw:image xlink:href="Pictures/1000000100000100000001004C96EA54.png" xlink:type="simple" xlink:show="embed" xlink:actuate="onLoad" draw:mime-type="image/png">
            <text:p/>
          </draw:image>
          <svg:desc>preencoded.png</svg:desc>
        </draw:frame>
        <draw:custom-shape draw:name="Shape 27" draw:style-name="gr31" draw:text-style-name="P15" draw:layer="layout" svg:width="10.159cm" svg:height="1.269cm" svg:x="14.275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4" draw:text-style-name="P7" draw:layer="layout" svg:width="9.651cm" svg:height="1.167cm" svg:x="14.529cm" svg:y="10.439cm">
          <text:p text:style-name="P6"><text:span text:style-name="T13">Export CSV theo phòng ban theo yêu cầ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3" draw:layer="layout" svg:width="0.888cm" svg:height="0.888cm" svg:x="13.081cm" svg:y="12.04cm">
          <draw:image xlink:href="Pictures/1000000100000100000001009D680981.png" xlink:type="simple" xlink:show="embed" xlink:actuate="onLoad" draw:mime-type="image/png">
            <text:p/>
          </draw:image>
          <svg:desc>preencoded.png</svg:desc>
        </draw:frame>
        <draw:custom-shape draw:name="Shape 29" draw:style-name="gr31" draw:text-style-name="P15" draw:layer="layout" svg:width="10.159cm" svg:height="1.269cm" svg:x="14.275cm" svg:y="11.9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5" draw:text-style-name="P7" draw:layer="layout" svg:width="9.651cm" svg:height="1.167cm" svg:x="14.529cm" svg:y="12.014cm">
          <text:p text:style-name="P6"><text:span text:style-name="T13">Tích hợp Dashboard tuỳ chỉnh theo chức v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6" draw:text-style-name="P7" draw:layer="layout" svg:width="23.875cm" svg:height="0.761cm" svg:x="0.762cm" svg:y="13.462cm">
          <text:p text:style-name="P6"><text:span text:style-name="T14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7" draw:text-style-name="P9" draw:layer="layout" svg:width="3.047cm" svg:height="0.761cm" svg:x="21.59cm" svg:y="13.462cm">
          <text:p text:style-name="P8"><text:span text:style-name="T14">2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38" draw:text-style-name="P16" draw:layer="layout" svg:width="25.399cm" svg:height="2.53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0.457cm">
          <draw:image xlink:href="Pictures/100000010000010000000100B887DD94.png" xlink:type="simple" xlink:show="embed" xlink:actuate="onLoad" draw:mime-type="image/png">
            <text:p/>
          </draw:image>
          <svg:desc>preencoded.png</svg:desc>
        </draw:frame>
        <draw:custom-shape draw:name="Text 1" draw:style-name="gr39" draw:text-style-name="P7" draw:layer="layout" svg:width="19.049cm" svg:height="1.98cm" svg:x="2.667cm" svg:y="0.254cm">
          <text:p text:style-name="P6"><text:span text:style-name="T15">Architectural Components &amp;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0" draw:text-style-name="P5" draw:layer="layout" svg:width="2.285cm" svg:height="2.234cm" svg:x="22.352cm" svg:y="0.127cm">
          <text:p text:style-name="P4"><text:span text:style-name="T16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17" draw:layer="layout" svg:width="1.904cm" svg:height="1.269cm" svg:x="0.381cm" svg:y="2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2" draw:text-style-name="P5" draw:layer="layout" svg:width="1.904cm" svg:height="1.269cm" svg:x="0.381cm" svg:y="2.896cm">
          <text:p text:style-name="P4"><text:span text:style-name="T17">BRON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3" draw:text-style-name="P18" draw:layer="layout" svg:width="22.478cm" svg:height="2.437cm" svg:x="2.489cm" svg:y="2.8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7" draw:layer="layout" svg:width="21.843cm" svg:height="0.71cm" svg:x="2.743cm" svg:y="2.896cm">
          <text:p text:style-name="P6"><text:span text:style-name="T9">Ingestion Layer <text:s/>– <text:s/>Landing Z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634cm" svg:height="0.634cm" svg:x="2.87cm" svg:y="3.708cm">
          <draw:image xlink:href="Pictures/10000001000001000000010031F0CE6A.png" xlink:type="simple" xlink:show="embed" xlink:actuate="onLoad" draw:mime-type="image/png">
            <text:p/>
          </draw:image>
          <svg:desc>preencoded.png</svg:desc>
        </draw:frame>
        <draw:custom-shape draw:name="Text 7" draw:style-name="gr45" draw:text-style-name="P7" draw:layer="layout" svg:width="10.032cm" svg:height="0.634cm" svg:x="3.607cm" svg:y="3.658cm">
          <text:p text:style-name="P6"><text:span text:style-name="T18">API Craw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" draw:text-style-name="P7" draw:layer="layout" svg:width="10.743cm" svg:height="0.913cm" svg:x="2.87cm" svg:y="4.343cm">
          <text:p text:style-name="P6"><text:span text:style-name="T19">Python/Requests · fetches raw JSON · only needs endpoint to ex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7" draw:text-style-name="P19" draw:layer="layout" svg:width="0.05cm" svg:height="1.472cm" svg:x="13.691cm" svg:y="3.7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634cm" svg:height="0.634cm" svg:x="13.919cm" svg:y="3.708cm">
          <draw:image xlink:href="Pictures/10000001000001000000010013230697.png" xlink:type="simple" xlink:show="embed" xlink:actuate="onLoad" draw:mime-type="image/png">
            <text:p/>
          </draw:image>
          <svg:desc>preencoded.png</svg:desc>
        </draw:frame>
        <draw:custom-shape draw:name="Text 10" draw:style-name="gr48" draw:text-style-name="P7" draw:layer="layout" svg:width="10.032cm" svg:height="0.634cm" svg:x="14.656cm" svg:y="3.658cm">
          <text:p text:style-name="P6"><text:span text:style-name="T18">PostgreSQL JSON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9" draw:text-style-name="P7" draw:layer="layout" svg:width="10.743cm" svg:height="0.913cm" svg:x="13.919cm" svg:y="4.343cm">
          <text:p text:style-name="P6"><text:span text:style-name="T19">Schema-on-Read · raw_data JSONB column · 100% immune to field ren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01cm" svg:height="0.304cm" svg:x="1.295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0" draw:text-style-name="P20" draw:layer="layout" svg:width="1.904cm" svg:height="1.269cm" svg:x="0.381cm" svg:y="5.6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1" draw:text-style-name="P5" draw:layer="layout" svg:width="1.904cm" svg:height="1.269cm" svg:x="0.381cm" svg:y="5.639cm">
          <text:p text:style-name="P4"><text:span text:style-name="T17">SI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2" draw:text-style-name="P21" draw:layer="layout" svg:width="22.478cm" svg:height="2.437cm" svg:x="2.489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3" draw:text-style-name="P7" draw:layer="layout" svg:width="21.843cm" svg:height="0.71cm" svg:x="2.743cm" svg:y="5.639cm">
          <text:p text:style-name="P6"><text:span text:style-name="T20">Processing Layer <text:s/>– <text:s/>Analytical Z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634cm" svg:height="0.634cm" svg:x="2.87cm" svg:y="6.452cm">
          <draw:image xlink:href="Pictures/10000001000001000000010051733180.png" xlink:type="simple" xlink:show="embed" xlink:actuate="onLoad" draw:mime-type="image/png">
            <text:p/>
          </draw:image>
          <svg:desc>preencoded.png</svg:desc>
        </draw:frame>
        <draw:custom-shape draw:name="Text 17" draw:style-name="gr54" draw:text-style-name="P7" draw:layer="layout" svg:width="6.349cm" svg:height="0.634cm" svg:x="3.607cm" svg:y="6.401cm">
          <text:p text:style-name="P6"><text:span text:style-name="T18">Config Repo (G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5" draw:text-style-name="P7" draw:layer="layout" svg:width="7.06cm" svg:height="0.913cm" svg:x="2.87cm" svg:y="7.087cm">
          <text:p text:style-name="P6"><text:span text:style-name="T19">mappings.yaml · source aliases · SENSITIVE column tags · Source of Tr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7" draw:text-style-name="P19" draw:layer="layout" svg:width="0.05cm" svg:height="1.472cm" svg:x="10.008cm" svg:y="6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634cm" svg:height="0.634cm" svg:x="10.236cm" svg:y="6.452cm">
          <draw:image xlink:href="Pictures/100000010000010000000100849B506B.png" xlink:type="simple" xlink:show="embed" xlink:actuate="onLoad" draw:mime-type="image/png">
            <text:p/>
          </draw:image>
          <svg:desc>preencoded.png</svg:desc>
        </draw:frame>
        <draw:custom-shape draw:name="Text 20" draw:style-name="gr56" draw:text-style-name="P7" draw:layer="layout" svg:width="6.349cm" svg:height="0.634cm" svg:x="10.973cm" svg:y="6.401cm">
          <text:p text:style-name="P6"><text:span text:style-name="T18">Apache Sp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7" draw:text-style-name="P7" draw:layer="layout" svg:width="7.06cm" svg:height="0.913cm" svg:x="10.236cm" svg:y="7.087cm">
          <text:p text:style-name="P6"><text:span text:style-name="T19">COALESCE + alias logic · flattens JSON → structured · PII masking befor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7" draw:text-style-name="P19" draw:layer="layout" svg:width="0.05cm" svg:height="1.472cm" svg:x="17.374cm" svg:y="6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634cm" svg:height="0.634cm" svg:x="17.602cm" svg:y="6.452cm">
          <draw:image xlink:href="Pictures/1000000100000100000001001F61B687.png" xlink:type="simple" xlink:show="embed" xlink:actuate="onLoad" draw:mime-type="image/png">
            <text:p/>
          </draw:image>
          <svg:desc>preencoded.png</svg:desc>
        </draw:frame>
        <draw:custom-shape draw:name="Text 23" draw:style-name="gr58" draw:text-style-name="P7" draw:layer="layout" svg:width="6.349cm" svg:height="0.634cm" svg:x="18.339cm" svg:y="6.401cm">
          <text:p text:style-name="P6"><text:span text:style-name="T18">Apache Iceberg (S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9" draw:text-style-name="P7" draw:layer="layout" svg:width="7.06cm" svg:height="0.913cm" svg:x="17.602cm" svg:y="7.087cm">
          <text:p text:style-name="P6"><text:span text:style-name="T19">Immutable table format · stable typed SQL interface · decoupled from API volat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" draw:text-style-name="P1" draw:layer="layout" svg:width="0.101cm" svg:height="0.304cm" svg:x="1.295cm" svg:y="8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1" draw:text-style-name="P17" draw:layer="layout" svg:width="1.904cm" svg:height="1.269cm" svg:x="0.381cm" svg:y="8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0" draw:text-style-name="P5" draw:layer="layout" svg:width="1.904cm" svg:height="1.269cm" svg:x="0.381cm" svg:y="8.382cm">
          <text:p text:style-name="P4"><text:span text:style-name="T17">G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3" draw:text-style-name="P18" draw:layer="layout" svg:width="22.478cm" svg:height="2.437cm" svg:x="2.489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1" draw:text-style-name="P7" draw:layer="layout" svg:width="21.843cm" svg:height="0.71cm" svg:x="2.743cm" svg:y="8.382cm">
          <text:p text:style-name="P6"><text:span text:style-name="T9">Consumption Layer <text:s/>– <text:s/>Agent &amp; BI Z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0.634cm" svg:height="0.634cm" svg:x="2.87cm" svg:y="9.195cm">
          <draw:image xlink:href="Pictures/1000000100000100000001004C96EA54.png" xlink:type="simple" xlink:show="embed" xlink:actuate="onLoad" draw:mime-type="image/png">
            <text:p/>
          </draw:image>
          <svg:desc>preencoded.png</svg:desc>
        </draw:frame>
        <draw:custom-shape draw:name="Text 30" draw:style-name="gr62" draw:text-style-name="P7" draw:layer="layout" svg:width="6.349cm" svg:height="0.634cm" svg:x="3.607cm" svg:y="9.144cm">
          <text:p text:style-name="P6"><text:span text:style-name="T18">Trino / Athe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63" draw:text-style-name="P7" draw:layer="layout" svg:width="7.06cm" svg:height="0.913cm" svg:x="2.87cm" svg:y="9.83cm">
          <text:p text:style-name="P6"><text:span text:style-name="T19">SQL query engine · shared by AI Agent + BI · never touches raw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47" draw:text-style-name="P19" draw:layer="layout" svg:width="0.05cm" svg:height="1.472cm" svg:x="10.008cm" svg:y="9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3" draw:layer="layout" svg:width="0.634cm" svg:height="0.634cm" svg:x="10.236cm" svg:y="9.195cm">
          <draw:image xlink:href="Pictures/10000001000001000000010009B0A67E.png" xlink:type="simple" xlink:show="embed" xlink:actuate="onLoad" draw:mime-type="image/png">
            <text:p/>
          </draw:image>
          <svg:desc>preencoded.png</svg:desc>
        </draw:frame>
        <draw:custom-shape draw:name="Text 33" draw:style-name="gr64" draw:text-style-name="P7" draw:layer="layout" svg:width="6.349cm" svg:height="0.634cm" svg:x="10.973cm" svg:y="9.144cm">
          <text:p text:style-name="P6"><text:span text:style-name="T18">AI Agent (LangGrap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65" draw:text-style-name="P7" draw:layer="layout" svg:width="7.06cm" svg:height="0.913cm" svg:x="10.236cm" svg:y="9.83cm">
          <text:p text:style-name="P6"><text:span text:style-name="T19">Queries Trino · fully unaware of upstream schema shif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47" draw:text-style-name="P19" draw:layer="layout" svg:width="0.05cm" svg:height="1.472cm" svg:x="17.374cm" svg:y="9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3" draw:layer="layout" svg:width="0.634cm" svg:height="0.634cm" svg:x="17.602cm" svg:y="9.195cm">
          <draw:image xlink:href="Pictures/1000000100000100000001009D680981.png" xlink:type="simple" xlink:show="embed" xlink:actuate="onLoad" draw:mime-type="image/png">
            <text:p/>
          </draw:image>
          <svg:desc>preencoded.png</svg:desc>
        </draw:frame>
        <draw:custom-shape draw:name="Text 36" draw:style-name="gr66" draw:text-style-name="P7" draw:layer="layout" svg:width="6.349cm" svg:height="0.634cm" svg:x="18.339cm" svg:y="9.144cm">
          <text:p text:style-name="P6"><text:span text:style-name="T18">BI Dashbo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67" draw:text-style-name="P7" draw:layer="layout" svg:width="7.06cm" svg:height="0.913cm" svg:x="17.602cm" svg:y="9.83cm">
          <text:p text:style-name="P6"><text:span text:style-name="T19">Apache Superset · queries same stable Iceberg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" draw:text-style-name="P1" draw:layer="layout" svg:width="0.101cm" svg:height="0.304cm" svg:x="1.295cm" svg:y="10.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68" draw:text-style-name="P22" draw:layer="layout" svg:width="1.904cm" svg:height="1.269cm" svg:x="0.38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69" draw:text-style-name="P5" draw:layer="layout" svg:width="1.904cm" svg:height="1.269cm" svg:x="0.381cm" svg:y="11.125cm">
          <text:p text:style-name="P4"><text:span text:style-name="T17">⚡ </text:span><text:span text:style-name="T17">H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0" draw:text-style-name="P23" draw:layer="layout" svg:width="22.478cm" svg:height="2.437cm" svg:x="2.489cm" svg:y="11.0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71" draw:text-style-name="P7" draw:layer="layout" svg:width="21.843cm" svg:height="0.71cm" svg:x="2.743cm" svg:y="11.125cm">
          <text:p text:style-name="P6"><text:span text:style-name="T21">Schema Remediation Agent <text:s/>– <text:s/>Self-Hea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3" draw:layer="layout" svg:width="0.634cm" svg:height="0.634cm" svg:x="2.87cm" svg:y="11.938cm">
          <draw:image xlink:href="Pictures/100000010000010000000100CF40806F.png" xlink:type="simple" xlink:show="embed" xlink:actuate="onLoad" draw:mime-type="image/png">
            <text:p/>
          </draw:image>
          <svg:desc>preencoded.png</svg:desc>
        </draw:frame>
        <draw:custom-shape draw:name="Text 43" draw:style-name="gr72" draw:text-style-name="P7" draw:layer="layout" svg:width="6.349cm" svg:height="0.634cm" svg:x="3.607cm" svg:y="11.887cm">
          <text:p text:style-name="P6"><text:span text:style-name="T18">Data Quality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73" draw:text-style-name="P7" draw:layer="layout" svg:width="7.06cm" svg:height="0.913cm" svg:x="2.87cm" svg:y="12.573cm">
          <text:p text:style-name="P6"><text:span text:style-name="T19">Great Expectations · detects columns suddenly 100% null · fires al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47" draw:text-style-name="P19" draw:layer="layout" svg:width="0.05cm" svg:height="1.472cm" svg:x="10.008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3" draw:text-style-name="P3" draw:layer="layout" svg:width="0.634cm" svg:height="0.634cm" svg:x="10.236cm" svg:y="11.938cm">
          <draw:image xlink:href="Pictures/10000001000001000000010009B0A67E.png" xlink:type="simple" xlink:show="embed" xlink:actuate="onLoad" draw:mime-type="image/png">
            <text:p/>
          </draw:image>
          <svg:desc>preencoded.png</svg:desc>
        </draw:frame>
        <draw:custom-shape draw:name="Text 46" draw:style-name="gr74" draw:text-style-name="P7" draw:layer="layout" svg:width="6.349cm" svg:height="0.634cm" svg:x="10.973cm" svg:y="11.887cm">
          <text:p text:style-name="P6"><text:span text:style-name="T18">LLM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75" draw:text-style-name="P7" draw:layer="layout" svg:width="7.06cm" svg:height="0.913cm" svg:x="10.236cm" svg:y="12.573cm">
          <text:p text:style-name="P6"><text:span text:style-name="T19">Receives DQ alert · samples JSONB raw data · reasons to find semantic 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47" draw:text-style-name="P19" draw:layer="layout" svg:width="0.05cm" svg:height="1.472cm" svg:x="17.374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3" draw:text-style-name="P3" draw:layer="layout" svg:width="0.634cm" svg:height="0.634cm" svg:x="17.602cm" svg:y="11.938cm">
          <draw:image xlink:href="Pictures/10000001000001000000010001967A70.png" xlink:type="simple" xlink:show="embed" xlink:actuate="onLoad" draw:mime-type="image/png">
            <text:p/>
          </draw:image>
          <svg:desc>preencoded.png</svg:desc>
        </draw:frame>
        <draw:custom-shape draw:name="Text 49" draw:style-name="gr76" draw:text-style-name="P7" draw:layer="layout" svg:width="6.349cm" svg:height="0.634cm" svg:x="18.339cm" svg:y="11.887cm">
          <text:p text:style-name="P6"><text:span text:style-name="T18">Auto-Remed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77" draw:text-style-name="P7" draw:layer="layout" svg:width="7.06cm" svg:height="0.913cm" svg:x="17.602cm" svg:y="12.573cm">
          <text:p text:style-name="P6"><text:span text:style-name="T19">Submits PR to update mappings.yaml · pipeline auto-repairs + backfills from JSONB 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78" draw:text-style-name="P7" draw:layer="layout" svg:width="23.875cm" svg:height="0.558cm" svg:x="0.762cm" svg:y="13.665cm">
          <text:p text:style-name="P6"><text:span text:style-name="T22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79" draw:text-style-name="P9" draw:layer="layout" svg:width="3.047cm" svg:height="0.558cm" svg:x="21.59cm" svg:y="13.665cm">
          <text:p text:style-name="P8"><text:span text:style-name="T22">3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Shape 0" draw:style-name="gr14" draw:text-style-name="P13" draw:layer="layout" svg:width="25.399cm" svg:height="2.53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472cm" svg:height="1.472cm" svg:x="0.762cm" svg:y="0.457cm">
          <draw:image xlink:href="Pictures/100000010000010000000100B577FD80.png" xlink:type="simple" xlink:show="embed" xlink:actuate="onLoad" draw:mime-type="image/png">
            <text:p/>
          </draw:image>
          <svg:desc>preencoded.png</svg:desc>
        </draw:frame>
        <draw:custom-shape draw:name="Text 1" draw:style-name="gr80" draw:text-style-name="P7" draw:layer="layout" svg:width="19.049cm" svg:height="1.98cm" svg:x="2.667cm" svg:y="0.254cm">
          <text:p text:style-name="P6"><text:span text:style-name="T23">Sensitive Data Management <text:s/>– <text:s/>PII Guardr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1" draw:text-style-name="P5" draw:layer="layout" svg:width="2.285cm" svg:height="2.234cm" svg:x="22.352cm" svg:y="0.127cm">
          <text:p text:style-name="P4"><text:span text:style-name="T16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2" draw:text-style-name="P7" draw:layer="layout" svg:width="11.429cm" svg:height="0.888cm" svg:x="0.711cm" svg:y="2.794cm">
          <text:p text:style-name="P6"><text:span text:style-name="T24">Data Governance at Schema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6" draw:text-style-name="P14" draw:layer="layout" svg:width="11.048cm" svg:height="1.929cm" svg:x="0.711cm" svg:y="3.9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4" draw:text-style-name="P13" draw:layer="layout" svg:width="0.964cm" svg:height="0.964cm" svg:x="0.813cm" svg:y="4.394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83" draw:text-style-name="P5" draw:layer="layout" svg:width="0.964cm" svg:height="0.964cm" svg:x="0.813cm" svg:y="4.394cm">
          <text:p text:style-name="P4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761cm" svg:height="0.761cm" svg:x="1.981cm" svg:y="4.445cm">
          <draw:image xlink:href="Pictures/10000001000001000000010051733180.png" xlink:type="simple" xlink:show="embed" xlink:actuate="onLoad" draw:mime-type="image/png">
            <text:p/>
          </draw:image>
          <svg:desc>preencoded.png</svg:desc>
        </draw:frame>
        <draw:custom-shape draw:name="Text 7" draw:style-name="gr84" draw:text-style-name="P7" draw:layer="layout" svg:width="8.635cm" svg:height="0.761cm" svg:x="2.896cm" svg:y="4.089cm">
          <text:p text:style-name="P6"><text:span text:style-name="T25">Tag in mappings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5" draw:text-style-name="P7" draw:layer="layout" svg:width="8.635cm" svg:height="0.761cm" svg:x="2.896cm" svg:y="4.902cm">
          <text:p text:style-name="P6"><text:span text:style-name="T26">pii: true on ssn, email, phon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4" draw:text-style-name="P13" draw:layer="layout" svg:width="0.101cm" svg:height="0.304cm" svg:x="1.219cm" svg:y="5.8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6" draw:text-style-name="P24" draw:layer="layout" svg:width="11.048cm" svg:height="1.929cm" svg:x="0.711cm" svg:y="6.1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" draw:text-style-name="P13" draw:layer="layout" svg:width="0.964cm" svg:height="0.964cm" svg:x="0.813cm" svg:y="6.62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87" draw:text-style-name="P5" draw:layer="layout" svg:width="0.964cm" svg:height="0.964cm" svg:x="0.813cm" svg:y="6.629cm">
          <text:p text:style-name="P4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761cm" svg:height="0.761cm" svg:x="1.981cm" svg:y="6.68cm">
          <draw:image xlink:href="Pictures/100000010000010000000100849B506B.png" xlink:type="simple" xlink:show="embed" xlink:actuate="onLoad" draw:mime-type="image/png">
            <text:p/>
          </draw:image>
          <svg:desc>preencoded.png</svg:desc>
        </draw:frame>
        <draw:custom-shape draw:name="Text 13" draw:style-name="gr88" draw:text-style-name="P7" draw:layer="layout" svg:width="8.635cm" svg:height="0.761cm" svg:x="2.896cm" svg:y="6.325cm">
          <text:p text:style-name="P6"><text:span text:style-name="T27">Spark detects pii: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9" draw:text-style-name="P7" draw:layer="layout" svg:width="8.635cm" svg:height="0.761cm" svg:x="2.896cm" svg:y="7.137cm">
          <text:p text:style-name="P6"><text:span text:style-name="T26">Engine intercepts befor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" draw:text-style-name="P13" draw:layer="layout" svg:width="0.101cm" svg:height="0.304cm" svg:x="1.219cm" svg:y="8.1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90" draw:text-style-name="P25" draw:layer="layout" svg:width="11.048cm" svg:height="1.929cm" svg:x="0.711cm" svg:y="8.4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4" draw:text-style-name="P13" draw:layer="layout" svg:width="0.964cm" svg:height="0.964cm" svg:x="0.813cm" svg:y="8.86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91" draw:text-style-name="P5" draw:layer="layout" svg:width="0.964cm" svg:height="0.964cm" svg:x="0.813cm" svg:y="8.865cm">
          <text:p text:style-name="P4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761cm" svg:height="0.761cm" svg:x="1.981cm" svg:y="8.915cm">
          <draw:image xlink:href="Pictures/100000010000010000000100B577FD80.png" xlink:type="simple" xlink:show="embed" xlink:actuate="onLoad" draw:mime-type="image/png">
            <text:p/>
          </draw:image>
          <svg:desc>preencoded.png</svg:desc>
        </draw:frame>
        <draw:custom-shape draw:name="Text 19" draw:style-name="gr92" draw:text-style-name="P7" draw:layer="layout" svg:width="8.635cm" svg:height="0.761cm" svg:x="2.896cm" svg:y="8.56cm">
          <text:p text:style-name="P6"><text:span text:style-name="T28">Mask / Token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3" draw:text-style-name="P7" draw:layer="layout" svg:width="8.635cm" svg:height="0.761cm" svg:x="2.896cm" svg:y="9.373cm">
          <text:p text:style-name="P6"><text:span text:style-name="T26">SSN → ****-**-1234 · email has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4" draw:text-style-name="P13" draw:layer="layout" svg:width="0.101cm" svg:height="0.304cm" svg:x="1.219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31" draw:text-style-name="P15" draw:layer="layout" svg:width="11.048cm" svg:height="1.929cm" svg:x="0.711cm" svg:y="10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" draw:text-style-name="P13" draw:layer="layout" svg:width="0.964cm" svg:height="0.964cm" svg:x="0.813cm" svg:y="11.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94" draw:text-style-name="P5" draw:layer="layout" svg:width="0.964cm" svg:height="0.964cm" svg:x="0.813cm" svg:y="11.1cm">
          <text:p text:style-name="P4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761cm" svg:height="0.761cm" svg:x="1.981cm" svg:y="11.151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25" draw:style-name="gr95" draw:text-style-name="P7" draw:layer="layout" svg:width="8.635cm" svg:height="0.761cm" svg:x="2.896cm" svg:y="10.795cm">
          <text:p text:style-name="P6"><text:span text:style-name="T29">Safe Iceberg 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6" draw:text-style-name="P7" draw:layer="layout" svg:width="8.635cm" svg:height="0.761cm" svg:x="2.896cm" svg:y="11.608cm">
          <text:p text:style-name="P6"><text:span text:style-name="T26">Masked data in Gold layer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97" draw:text-style-name="P7" draw:layer="layout" svg:width="11.937cm" svg:height="0.888cm" svg:x="12.7cm" svg:y="2.794cm">
          <text:p text:style-name="P6"><text:span text:style-name="T24">mappings.yaml <text:s/>— <text:s/>Source of Tr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98" draw:text-style-name="P26" draw:layer="layout" svg:width="12.064cm" svg:height="6.908cm" svg:x="12.7cm" svg:y="3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99" draw:text-style-name="P27" draw:layer="layout" svg:width="12.064cm" svg:height="0.71cm" svg:x="12.7cm" svg:y="3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00" draw:text-style-name="P28" draw:layer="layout" svg:width="0.253cm" svg:height="0.253cm" svg:x="13.005cm" svg:y="4.03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gr101" draw:text-style-name="P29" draw:layer="layout" svg:width="0.253cm" svg:height="0.253cm" svg:x="13.411cm" svg:y="4.03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" draw:style-name="gr102" draw:text-style-name="P30" draw:layer="layout" svg:width="0.253cm" svg:height="0.253cm" svg:x="13.818cm" svg:y="4.03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" draw:style-name="gr103" draw:text-style-name="P5" draw:layer="layout" svg:width="8.889cm" svg:height="0.71cm" svg:x="14.224cm" svg:y="3.861cm">
          <text:p text:style-name="P4"><text:span text:style-name="T30">mappings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04" draw:text-style-name="P7" draw:layer="layout" svg:width="11.556cm" svg:height="0.558cm" svg:x="12.954cm" svg:y="4.674cm">
          <text:p text:style-name="P6"><text:span text:style-name="T31">colum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05" draw:text-style-name="P7" draw:layer="layout" svg:width="11.556cm" svg:height="0.558cm" svg:x="12.954cm" svg:y="5.232cm">
          <text:p text:style-name="P6"><text:span text:style-name="T32"><text:s text:c="2"/></text:span><text:span text:style-name="T32">- target: </text:span><text:span text:style-name="T33">ss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06" draw:text-style-name="P7" draw:layer="layout" svg:width="11.556cm" svg:height="0.558cm" svg:x="12.954cm" svg:y="5.791cm">
          <text:p text:style-name="P6"><text:span text:style-name="T32"><text:s text:c="4"/></text:span><text:span text:style-name="T32">source_alias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07" draw:text-style-name="P7" draw:layer="layout" svg:width="11.556cm" svg:height="0.558cm" svg:x="12.954cm" svg:y="6.35cm">
          <text:p text:style-name="P6"><text:span text:style-name="T32"><text:s text:c="6"/></text:span><text:span text:style-name="T32">- </text:span><text:span text:style-name="T34">"social_security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08" draw:text-style-name="P7" draw:layer="layout" svg:width="11.556cm" svg:height="0.558cm" svg:x="12.954cm" svg:y="6.909cm">
          <text:p text:style-name="P6"><text:span text:style-name="T32"><text:s text:c="6"/></text:span><text:span text:style-name="T32">- </text:span><text:span text:style-name="T34">"national_id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09" draw:text-style-name="P7" draw:layer="layout" svg:width="11.556cm" svg:height="0.558cm" svg:x="12.954cm" svg:y="7.468cm">
          <text:p text:style-name="P6"><text:span text:style-name="T32"><text:s text:c="4"/></text:span><text:span text:style-name="T32">pii: </text:span><text:span text:style-name="T35">true</text:span><text:span text:style-name="T36"> <text:s/># ← Tag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10" draw:text-style-name="P31" draw:layer="layout" svg:width="11.556cm" svg:height="0.558cm" svg:x="12.954cm" svg:y="8.026cm">
          <text:p text:style-name="P6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11" draw:text-style-name="P7" draw:layer="layout" svg:width="11.556cm" svg:height="0.558cm" svg:x="12.954cm" svg:y="8.585cm">
          <text:p text:style-name="P6"><text:span text:style-name="T32"><text:s text:c="2"/></text:span><text:span text:style-name="T32">- target: </text:span><text:span text:style-name="T33">e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12" draw:text-style-name="P7" draw:layer="layout" svg:width="11.556cm" svg:height="0.558cm" svg:x="12.954cm" svg:y="9.144cm">
          <text:p text:style-name="P6"><text:span text:style-name="T32"><text:s text:c="4"/></text:span><text:span text:style-name="T32">source_alias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13" draw:text-style-name="P7" draw:layer="layout" svg:width="11.556cm" svg:height="0.558cm" svg:x="12.954cm" svg:y="9.703cm">
          <text:p text:style-name="P6"><text:span text:style-name="T32"><text:s text:c="6"/></text:span><text:span text:style-name="T32">- </text:span><text:span text:style-name="T34">"email_addres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14" draw:text-style-name="P7" draw:layer="layout" svg:width="11.556cm" svg:height="0.558cm" svg:x="12.954cm" svg:y="10.262cm">
          <text:p text:style-name="P6"><text:span text:style-name="T32"><text:s text:c="4"/></text:span><text:span text:style-name="T32">pii: </text:span><text:span text:style-name="T35">true</text:span><text:span text:style-name="T36"> <text:s/># ← Tag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10" draw:text-style-name="P31" draw:layer="layout" svg:width="11.556cm" svg:height="0.558cm" svg:x="12.954cm" svg:y="10.82cm">
          <text:p text:style-name="P6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15" draw:text-style-name="P7" draw:layer="layout" svg:width="11.556cm" svg:height="0.558cm" svg:x="12.954cm" svg:y="11.379cm">
          <text:p text:style-name="P6"><text:span text:style-name="T32"><text:s text:c="2"/></text:span><text:span text:style-name="T32">- target: </text:span><text:span text:style-name="T33">reve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16" draw:text-style-name="P7" draw:layer="layout" svg:width="11.556cm" svg:height="0.558cm" svg:x="12.954cm" svg:y="11.938cm">
          <text:p text:style-name="P6"><text:span text:style-name="T32"><text:s text:c="4"/></text:span><text:span text:style-name="T32">source_alias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17" draw:text-style-name="P7" draw:layer="layout" svg:width="11.556cm" svg:height="0.558cm" svg:x="12.954cm" svg:y="12.497cm">
          <text:p text:style-name="P6"><text:span text:style-name="T32"><text:s text:c="6"/></text:span><text:span text:style-name="T32">- </text:span><text:span text:style-name="T34">"total_sale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18" draw:text-style-name="P7" draw:layer="layout" svg:width="11.556cm" svg:height="0.558cm" svg:x="12.954cm" svg:y="13.056cm">
          <text:p text:style-name="P6"><text:span text:style-name="T32"><text:s text:c="4"/></text:span><text:span text:style-name="T32">pii: </text:span><text:span text:style-name="T31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19" draw:text-style-name="P32" draw:layer="layout" svg:width="3.86cm" svg:height="2.234cm" svg:x="12.7cm" svg:y="11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761cm" svg:height="0.761cm" svg:x="13.005cm" svg:y="11.227cm">
          <draw:image xlink:href="Pictures/100000010000010000000100C1B66118.png" xlink:type="simple" xlink:show="embed" xlink:actuate="onLoad" draw:mime-type="image/png">
            <text:p/>
          </draw:image>
          <svg:desc>preencoded.png</svg:desc>
        </draw:frame>
        <draw:custom-shape draw:name="Text 51" draw:style-name="gr120" draw:text-style-name="P7" draw:layer="layout" svg:width="2.539cm" svg:height="0.761cm" svg:x="13.919cm" svg:y="11.074cm">
          <text:p text:style-name="P6"><text:span text:style-name="T38">RB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21" draw:text-style-name="P7" draw:layer="layout" svg:width="3.453cm" svg:height="1.218cm" svg:x="12.903cm" svg:y="11.887cm">
          <text:p text:style-name="P6"><text:span text:style-name="T39">Role-based access per phòng b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119" draw:text-style-name="P32" draw:layer="layout" svg:width="3.86cm" svg:height="2.234cm" svg:x="16.764cm" svg:y="11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0.761cm" svg:height="0.761cm" svg:x="17.069cm" svg:y="11.227cm">
          <draw:image xlink:href="Pictures/100000010000010000000100CF40806F.png" xlink:type="simple" xlink:show="embed" xlink:actuate="onLoad" draw:mime-type="image/png">
            <text:p/>
          </draw:image>
          <svg:desc>preencoded.png</svg:desc>
        </draw:frame>
        <draw:custom-shape draw:name="Text 54" draw:style-name="gr122" draw:text-style-name="P7" draw:layer="layout" svg:width="2.539cm" svg:height="0.761cm" svg:x="17.983cm" svg:y="11.074cm">
          <text:p text:style-name="P6"><text:span text:style-name="T38">Audi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123" draw:text-style-name="P7" draw:layer="layout" svg:width="3.453cm" svg:height="1.218cm" svg:x="16.967cm" svg:y="11.887cm">
          <text:p text:style-name="P6"><text:span text:style-name="T39">Mọi query đều được ghi lạ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19" draw:text-style-name="P32" draw:layer="layout" svg:width="3.86cm" svg:height="2.234cm" svg:x="20.828cm" svg:y="11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3" draw:layer="layout" svg:width="0.761cm" svg:height="0.761cm" svg:x="21.133cm" svg:y="11.227cm">
          <draw:image xlink:href="Pictures/100000010000010000000100B577FD80.png" xlink:type="simple" xlink:show="embed" xlink:actuate="onLoad" draw:mime-type="image/png">
            <text:p/>
          </draw:image>
          <svg:desc>preencoded.png</svg:desc>
        </draw:frame>
        <draw:custom-shape draw:name="Text 57" draw:style-name="gr124" draw:text-style-name="P7" draw:layer="layout" svg:width="2.539cm" svg:height="0.761cm" svg:x="22.047cm" svg:y="11.074cm">
          <text:p text:style-name="P6"><text:span text:style-name="T38">Encrypt at 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125" draw:text-style-name="P7" draw:layer="layout" svg:width="3.453cm" svg:height="1.218cm" svg:x="21.031cm" svg:y="11.887cm">
          <text:p text:style-name="P6"><text:span text:style-name="T39">S3 SSE + RDS encry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126" draw:text-style-name="P7" draw:layer="layout" svg:width="23.875cm" svg:height="0.558cm" svg:x="0.762cm" svg:y="13.665cm">
          <text:p text:style-name="P6"><text:span text:style-name="T14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127" draw:text-style-name="P9" draw:layer="layout" svg:width="3.047cm" svg:height="0.558cm" svg:x="21.59cm" svg:y="13.665cm">
          <text:p text:style-name="P8"><text:span text:style-name="T14">4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Shape 0" draw:style-name="gr14" draw:text-style-name="P13" draw:layer="layout" svg:width="25.399cm" svg:height="2.79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889cm" svg:y="0.559cm">
          <draw:image xlink:href="Pictures/10000001000001000000010049B145FE.png" xlink:type="simple" xlink:show="embed" xlink:actuate="onLoad" draw:mime-type="image/png">
            <text:p/>
          </draw:image>
          <svg:desc>preencoded.png</svg:desc>
        </draw:frame>
        <draw:custom-shape draw:name="Text 1" draw:style-name="gr128" draw:text-style-name="P7" draw:layer="layout" svg:width="15.239cm" svg:height="2.158cm" svg:x="2.794cm" svg:y="0.305cm">
          <text:p text:style-name="P6"><text:span text:style-name="T7">Cos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9" draw:text-style-name="P5" draw:layer="layout" svg:width="2.285cm" svg:height="2.285cm" svg:x="22.352cm" svg:y="0.254cm">
          <text:p text:style-name="P4"><text:span text:style-name="T8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0" draw:text-style-name="P5" draw:layer="layout" svg:width="23.875cm" svg:height="0.812cm" svg:x="0.762cm" svg:y="2.997cm">
          <text:p text:style-name="P4"><text:span text:style-name="T40">Giả định: 2.000–5.000 yêu cầu/tháng <text:s/>· <text:s/>1–5 TB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4" draw:text-style-name="P13" draw:layer="layout" svg:width="6.476cm" svg:height="1.218cm" svg:x="0.762cm" svg:y="4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1" draw:text-style-name="P7" draw:layer="layout" svg:width="6.222cm" svg:height="1.218cm" svg:x="1.016cm" svg:y="4.064cm">
          <text:p text:style-name="P6"><text:span text:style-name="T1">Hạng Mụ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" draw:text-style-name="P13" draw:layer="layout" svg:width="6.984cm" svg:height="1.218cm" svg:x="7.493cm" svg:y="4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2" draw:text-style-name="P7" draw:layer="layout" svg:width="6.73cm" svg:height="1.218cm" svg:x="7.747cm" svg:y="4.064cm">
          <text:p text:style-name="P6"><text:span text:style-name="T1">Công Ngh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4" draw:text-style-name="P13" draw:layer="layout" svg:width="3.936cm" svg:height="1.218cm" svg:x="14.732cm" svg:y="4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3" draw:text-style-name="P7" draw:layer="layout" svg:width="3.682cm" svg:height="1.218cm" svg:x="14.986cm" svg:y="4.064cm">
          <text:p text:style-name="P6"><text:span text:style-name="T1">MVP (Thấ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4" draw:text-style-name="P13" draw:layer="layout" svg:width="3.936cm" svg:height="1.218cm" svg:x="18.923cm" svg:y="4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4" draw:text-style-name="P7" draw:layer="layout" svg:width="3.682cm" svg:height="1.218cm" svg:x="19.177cm" svg:y="4.064cm">
          <text:p text:style-name="P6"><text:span text:style-name="T1">Growth (Ca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35" draw:text-style-name="P32" draw:layer="layout" svg:width="6.476cm" svg:height="1.193cm" svg:x="0.762cm" svg:y="5.2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6" draw:text-style-name="P7" draw:layer="layout" svg:width="6.222cm" svg:height="1.193cm" svg:x="1.016cm" svg:y="5.283cm">
          <text:p text:style-name="P6"><text:span text:style-name="T41">AI Model (LLM AP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35" draw:text-style-name="P32" draw:layer="layout" svg:width="6.984cm" svg:height="1.193cm" svg:x="7.493cm" svg:y="5.2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37" draw:text-style-name="P7" draw:layer="layout" svg:width="6.73cm" svg:height="1.193cm" svg:x="7.747cm" svg:y="5.283cm">
          <text:p text:style-name="P6"><text:span text:style-name="T41">GPT-5 Mini + Claude Op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35" draw:text-style-name="P32" draw:layer="layout" svg:width="3.936cm" svg:height="1.193cm" svg:x="14.732cm" svg:y="5.2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8" draw:text-style-name="P5" draw:layer="layout" svg:width="3.682cm" svg:height="1.193cm" svg:x="14.986cm" svg:y="5.283cm">
          <text:p text:style-name="P4"><text:span text:style-name="T42">$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5" draw:text-style-name="P32" draw:layer="layout" svg:width="3.936cm" svg:height="1.193cm" svg:x="18.923cm" svg:y="5.2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9" draw:text-style-name="P5" draw:layer="layout" svg:width="3.682cm" svg:height="1.193cm" svg:x="19.177cm" svg:y="5.283cm">
          <text:p text:style-name="P4"><text:span text:style-name="T42">$1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0" draw:text-style-name="P33" draw:layer="layout" svg:width="6.476cm" svg:height="1.193cm" svg:x="0.762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1" draw:text-style-name="P7" draw:layer="layout" svg:width="6.222cm" svg:height="1.193cm" svg:x="1.016cm" svg:y="6.604cm">
          <text:p text:style-name="P6"><text:span text:style-name="T41">Hạ tầng Data L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0" draw:text-style-name="P33" draw:layer="layout" svg:width="6.984cm" svg:height="1.193cm" svg:x="7.493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42" draw:text-style-name="P7" draw:layer="layout" svg:width="6.73cm" svg:height="1.193cm" svg:x="7.747cm" svg:y="6.604cm">
          <text:p text:style-name="P6"><text:span text:style-name="T41">AWS S3 Iceberg + Athe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40" draw:text-style-name="P33" draw:layer="layout" svg:width="3.936cm" svg:height="1.193cm" svg:x="14.732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3" draw:text-style-name="P5" draw:layer="layout" svg:width="3.682cm" svg:height="1.193cm" svg:x="14.986cm" svg:y="6.604cm">
          <text:p text:style-name="P4"><text:span text:style-name="T42">$4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40" draw:text-style-name="P33" draw:layer="layout" svg:width="3.936cm" svg:height="1.193cm" svg:x="18.923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4" draw:text-style-name="P5" draw:layer="layout" svg:width="3.682cm" svg:height="1.193cm" svg:x="19.177cm" svg:y="6.604cm">
          <text:p text:style-name="P4"><text:span text:style-name="T42">$1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35" draw:text-style-name="P32" draw:layer="layout" svg:width="6.476cm" svg:height="1.193cm" svg:x="0.762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45" draw:text-style-name="P7" draw:layer="layout" svg:width="6.222cm" svg:height="1.193cm" svg:x="1.016cm" svg:y="7.925cm">
          <text:p text:style-name="P6"><text:span text:style-name="T41">BI &amp;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35" draw:text-style-name="P32" draw:layer="layout" svg:width="6.984cm" svg:height="1.193cm" svg:x="7.493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6" draw:text-style-name="P7" draw:layer="layout" svg:width="6.73cm" svg:height="1.193cm" svg:x="7.747cm" svg:y="7.925cm">
          <text:p text:style-name="P6"><text:span text:style-name="T41">Apache Superset (self-ho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35" draw:text-style-name="P32" draw:layer="layout" svg:width="3.936cm" svg:height="1.193cm" svg:x="14.732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47" draw:text-style-name="P5" draw:layer="layout" svg:width="3.682cm" svg:height="1.193cm" svg:x="14.986cm" svg:y="7.925cm">
          <text:p text:style-name="P4"><text:span text:style-name="T42">$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35" draw:text-style-name="P32" draw:layer="layout" svg:width="3.936cm" svg:height="1.193cm" svg:x="18.923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48" draw:text-style-name="P5" draw:layer="layout" svg:width="3.682cm" svg:height="1.193cm" svg:x="19.177cm" svg:y="7.925cm">
          <text:p text:style-name="P4"><text:span text:style-name="T42">$1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40" draw:text-style-name="P33" draw:layer="layout" svg:width="6.476cm" svg:height="1.193cm" svg:x="0.762cm" svg:y="9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49" draw:text-style-name="P7" draw:layer="layout" svg:width="6.222cm" svg:height="1.193cm" svg:x="1.016cm" svg:y="9.246cm">
          <text:p text:style-name="P6"><text:span text:style-name="T41">Vận hành &amp; Bảo tr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40" draw:text-style-name="P33" draw:layer="layout" svg:width="6.984cm" svg:height="1.193cm" svg:x="7.493cm" svg:y="9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50" draw:text-style-name="P7" draw:layer="layout" svg:width="6.73cm" svg:height="1.193cm" svg:x="7.747cm" svg:y="9.246cm">
          <text:p text:style-name="P6"><text:span text:style-name="T41">MLOps + DE support (1/4 F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40" draw:text-style-name="P33" draw:layer="layout" svg:width="3.936cm" svg:height="1.193cm" svg:x="14.732cm" svg:y="9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51" draw:text-style-name="P5" draw:layer="layout" svg:width="3.682cm" svg:height="1.193cm" svg:x="14.986cm" svg:y="9.246cm">
          <text:p text:style-name="P4"><text:span text:style-name="T42">$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40" draw:text-style-name="P33" draw:layer="layout" svg:width="3.936cm" svg:height="1.193cm" svg:x="18.923cm" svg:y="9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52" draw:text-style-name="P5" draw:layer="layout" svg:width="3.682cm" svg:height="1.193cm" svg:x="19.177cm" svg:y="9.246cm">
          <text:p text:style-name="P4"><text:span text:style-name="T42">$1,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" draw:text-style-name="P1" draw:layer="layout" svg:width="6.476cm" svg:height="1.32cm" svg:x="0.762cm" svg:y="10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53" draw:text-style-name="P7" draw:layer="layout" svg:width="6.222cm" svg:height="1.32cm" svg:x="1.016cm" svg:y="10.566cm">
          <text:p text:style-name="P6"><text:span text:style-name="T4">TỔNG CỘNG / THÁ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" draw:text-style-name="P1" draw:layer="layout" svg:width="6.984cm" svg:height="1.32cm" svg:x="7.493cm" svg:y="10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10" draw:text-style-name="P34" draw:layer="layout" svg:width="6.73cm" svg:height="1.32cm" svg:x="7.747cm" svg:y="10.566cm">
          <text:p text:style-name="P6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" draw:text-style-name="P1" draw:layer="layout" svg:width="3.936cm" svg:height="1.32cm" svg:x="14.732cm" svg:y="10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54" draw:text-style-name="P5" draw:layer="layout" svg:width="3.682cm" svg:height="1.32cm" svg:x="14.986cm" svg:y="10.566cm">
          <text:p text:style-name="P4"><text:span text:style-name="T4">~$1,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" draw:text-style-name="P1" draw:layer="layout" svg:width="3.936cm" svg:height="1.32cm" svg:x="18.923cm" svg:y="10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55" draw:text-style-name="P5" draw:layer="layout" svg:width="3.682cm" svg:height="1.32cm" svg:x="19.177cm" svg:y="10.566cm">
          <text:p text:style-name="P4"><text:span text:style-name="T4">~$3,7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31" draw:text-style-name="P15" draw:layer="layout" svg:width="23.875cm" svg:height="1.828cm" svg:x="0.762cm" svg:y="11.8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964cm" svg:height="0.964cm" svg:x="1.067cm" svg:y="12.141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53" draw:style-name="gr156" draw:text-style-name="P7" draw:layer="layout" svg:width="4.063cm" svg:height="0.964cm" svg:x="2.235cm" svg:y="11.887cm">
          <text:p text:style-name="P6"><text:span text:style-name="T44">ROI Estima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57" draw:text-style-name="P7" draw:layer="layout" svg:width="22.097cm" svg:height="0.837cm" svg:x="2.235cm" svg:y="12.7cm">
          <text:p text:style-name="P6"><text:span text:style-name="T45">Thuê 2 DE + 2 DA ~ $4,000–$6,000/tháng <text:s/>→ <text:s/>Tiết kiệm 40–50% chi phí nhân sự, tốc độ phục vụ nhanh hơn đáng k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158" draw:text-style-name="P7" draw:layer="layout" svg:width="23.875cm" svg:height="0.634cm" svg:x="0.762cm" svg:y="13.665cm">
          <text:p text:style-name="P6"><text:span text:style-name="T14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159" draw:text-style-name="P9" draw:layer="layout" svg:width="3.047cm" svg:height="0.634cm" svg:x="21.59cm" svg:y="13.665cm">
          <text:p text:style-name="P8"><text:span text:style-name="T14">5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38" draw:text-style-name="P16" draw:layer="layout" svg:width="25.399cm" svg:height="2.79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889cm" svg:y="0.559cm">
          <draw:image xlink:href="Pictures/10000001000001000000010077E01269.png" xlink:type="simple" xlink:show="embed" xlink:actuate="onLoad" draw:mime-type="image/png">
            <text:p/>
          </draw:image>
          <svg:desc>preencoded.png</svg:desc>
        </draw:frame>
        <draw:custom-shape draw:name="Text 1" draw:style-name="gr160" draw:text-style-name="P7" draw:layer="layout" svg:width="15.239cm" svg:height="2.158cm" svg:x="2.794cm" svg:y="0.305cm">
          <text:p text:style-name="P6"><text:span text:style-name="T7">Optimization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1" draw:text-style-name="P5" draw:layer="layout" svg:width="2.285cm" svg:height="2.285cm" svg:x="22.352cm" svg:y="0.254cm">
          <text:p text:style-name="P4"><text:span text:style-name="T8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62" draw:text-style-name="P35" draw:layer="layout" svg:width="7.873cm" svg:height="10.413cm" svg:x="0.635cm" svg:y="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1.269cm" svg:height="1.269cm" svg:x="1.016cm" svg:y="3.302cm">
          <draw:image xlink:href="Pictures/10000001000001000000010013230697.png" xlink:type="simple" xlink:show="embed" xlink:actuate="onLoad" draw:mime-type="image/png">
            <text:p/>
          </draw:image>
          <svg:desc>preencoded.png</svg:desc>
        </draw:frame>
        <draw:custom-shape draw:name="Text 4" draw:style-name="gr163" draw:text-style-name="P7" draw:layer="layout" svg:width="5.841cm" svg:height="1.32cm" svg:x="2.464cm" svg:y="3.251cm">
          <text:p text:style-name="P6"><text:span text:style-name="T46">Data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" draw:text-style-name="P1" draw:layer="layout" svg:width="7.111cm" svg:height="0.075cm" svg:x="1.016cm" svg:y="4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71cm" svg:height="0.71cm" svg:x="1.016cm" svg:y="5.131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6" draw:style-name="gr164" draw:text-style-name="P7" draw:layer="layout" svg:width="6.476cm" svg:height="1.726cm" svg:x="1.905cm" svg:y="5.029cm">
          <text:p text:style-name="P6"><text:span text:style-name="T5">Parquet/Snappy compression → giảm 80-90% query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71cm" svg:height="0.71cm" svg:x="1.016cm" svg:y="6.96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7" draw:style-name="gr165" draw:text-style-name="P7" draw:layer="layout" svg:width="6.476cm" svg:height="1.726cm" svg:x="1.905cm" svg:y="6.858cm">
          <text:p text:style-name="P6"><text:span text:style-name="T5">Table partitioning theo ngày / TT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71cm" svg:height="0.71cm" svg:x="1.016cm" svg:y="8.788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8" draw:style-name="gr166" draw:text-style-name="P7" draw:layer="layout" svg:width="6.476cm" svg:height="1.726cm" svg:x="1.905cm" svg:y="8.687cm">
          <text:p text:style-name="P6"><text:span text:style-name="T5">Athena result caching để tái sử dụ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71cm" svg:height="0.71cm" svg:x="1.016cm" svg:y="10.617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9" draw:style-name="gr167" draw:text-style-name="P7" draw:layer="layout" svg:width="6.476cm" svg:height="1.726cm" svg:x="1.905cm" svg:y="10.516cm">
          <text:p text:style-name="P6"><text:span text:style-name="T5">Xóa / archive data cũ định k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68" draw:text-style-name="P36" draw:layer="layout" svg:width="7.873cm" svg:height="10.413cm" svg:x="8.814cm" svg:y="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1.269cm" svg:height="1.269cm" svg:x="9.195cm" svg:y="3.302cm">
          <draw:image xlink:href="Pictures/10000001000001000000010009B0A67E.png" xlink:type="simple" xlink:show="embed" xlink:actuate="onLoad" draw:mime-type="image/png">
            <text:p/>
          </draw:image>
          <svg:desc>preencoded.png</svg:desc>
        </draw:frame>
        <draw:custom-shape draw:name="Text 11" draw:style-name="gr169" draw:text-style-name="P7" draw:layer="layout" svg:width="5.841cm" svg:height="1.32cm" svg:x="10.643cm" svg:y="3.251cm">
          <text:p text:style-name="P6"><text:span text:style-name="T46">AI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7.111cm" svg:height="0.075cm" svg:x="9.195cm" svg:y="4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3" draw:layer="layout" svg:width="0.71cm" svg:height="0.71cm" svg:x="9.195cm" svg:y="5.131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13" draw:style-name="gr170" draw:text-style-name="P7" draw:layer="layout" svg:width="6.476cm" svg:height="1.726cm" svg:x="10.084cm" svg:y="5.029cm">
          <text:p text:style-name="P6"><text:span text:style-name="T5">Hybrid routing: task đơn giản → model nhỏ rẻ h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3" draw:layer="layout" svg:width="0.71cm" svg:height="0.71cm" svg:x="9.195cm" svg:y="6.96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14" draw:style-name="gr171" draw:text-style-name="P7" draw:layer="layout" svg:width="6.476cm" svg:height="1.726cm" svg:x="10.084cm" svg:y="6.858cm">
          <text:p text:style-name="P6"><text:span text:style-name="T5">Prompt caching giảm input token tái sử dụ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3" draw:layer="layout" svg:width="0.71cm" svg:height="0.71cm" svg:x="9.195cm" svg:y="8.788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15" draw:style-name="gr172" draw:text-style-name="P7" draw:layer="layout" svg:width="6.476cm" svg:height="1.726cm" svg:x="10.084cm" svg:y="8.687cm">
          <text:p text:style-name="P6"><text:span text:style-name="T5">Schema mapping pre-load để giảm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3" draw:text-style-name="P3" draw:layer="layout" svg:width="0.71cm" svg:height="0.71cm" svg:x="9.195cm" svg:y="10.617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16" draw:style-name="gr173" draw:text-style-name="P7" draw:layer="layout" svg:width="6.476cm" svg:height="1.726cm" svg:x="10.084cm" svg:y="10.516cm">
          <text:p text:style-name="P6"><text:span text:style-name="T5">Batching requests thay vì gọi riêng l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74" draw:text-style-name="P37" draw:layer="layout" svg:width="7.873cm" svg:height="10.413cm" svg:x="16.993cm" svg:y="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3" draw:text-style-name="P3" draw:layer="layout" svg:width="1.269cm" svg:height="1.269cm" svg:x="17.374cm" svg:y="3.302cm">
          <draw:image xlink:href="Pictures/100000010000010000000100849B506B.png" xlink:type="simple" xlink:show="embed" xlink:actuate="onLoad" draw:mime-type="image/png">
            <text:p/>
          </draw:image>
          <svg:desc>preencoded.png</svg:desc>
        </draw:frame>
        <draw:custom-shape draw:name="Text 18" draw:style-name="gr175" draw:text-style-name="P7" draw:layer="layout" svg:width="5.841cm" svg:height="1.32cm" svg:x="18.821cm" svg:y="3.251cm">
          <text:p text:style-name="P6"><text:span text:style-name="T46">Infra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7.111cm" svg:height="0.075cm" svg:x="17.374cm" svg:y="4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3" draw:text-style-name="P3" draw:layer="layout" svg:width="0.71cm" svg:height="0.71cm" svg:x="17.374cm" svg:y="5.131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20" draw:style-name="gr176" draw:text-style-name="P7" draw:layer="layout" svg:width="6.476cm" svg:height="1.726cm" svg:x="18.263cm" svg:y="5.029cm">
          <text:p text:style-name="P6"><text:span text:style-name="T5">Serverless Lambda → không trả tiền khi 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3" draw:text-style-name="P3" draw:layer="layout" svg:width="0.71cm" svg:height="0.71cm" svg:x="17.374cm" svg:y="6.96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21" draw:style-name="gr177" draw:text-style-name="P7" draw:layer="layout" svg:width="6.476cm" svg:height="1.726cm" svg:x="18.263cm" svg:y="6.858cm">
          <text:p text:style-name="P6"><text:span text:style-name="T5">Auto-scale ECS theo giờ cao điể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3" draw:text-style-name="P3" draw:layer="layout" svg:width="0.71cm" svg:height="0.71cm" svg:x="17.374cm" svg:y="8.788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22" draw:style-name="gr178" draw:text-style-name="P7" draw:layer="layout" svg:width="6.476cm" svg:height="1.726cm" svg:x="18.263cm" svg:y="8.687cm">
          <text:p text:style-name="P6"><text:span text:style-name="T5">Reserved instances cho DB tiết kiệm ~3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3" draw:text-style-name="P3" draw:layer="layout" svg:width="0.71cm" svg:height="0.71cm" svg:x="17.374cm" svg:y="10.617cm">
          <draw:image xlink:href="Pictures/1000000100000100000001000827CB5C.png" xlink:type="simple" xlink:show="embed" xlink:actuate="onLoad" draw:mime-type="image/png">
            <text:p/>
          </draw:image>
          <svg:desc>preencoded.png</svg:desc>
        </draw:frame>
        <draw:custom-shape draw:name="Text 23" draw:style-name="gr179" draw:text-style-name="P7" draw:layer="layout" svg:width="6.476cm" svg:height="1.726cm" svg:x="18.263cm" svg:y="10.516cm">
          <text:p text:style-name="P6"><text:span text:style-name="T5">VPC endpoint giảm data transfer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0" draw:text-style-name="P7" draw:layer="layout" svg:width="23.875cm" svg:height="0.634cm" svg:x="0.762cm" svg:y="13.665cm">
          <text:p text:style-name="P6"><text:span text:style-name="T22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1" draw:text-style-name="P9" draw:layer="layout" svg:width="3.047cm" svg:height="0.634cm" svg:x="21.59cm" svg:y="13.665cm">
          <text:p text:style-name="P8"><text:span text:style-name="T22">6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14" draw:text-style-name="P13" draw:layer="layout" svg:width="25.399cm" svg:height="2.79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889cm" svg:y="0.559cm">
          <draw:image xlink:href="Pictures/1000000100000100000001009252EAE6.png" xlink:type="simple" xlink:show="embed" xlink:actuate="onLoad" draw:mime-type="image/png">
            <text:p/>
          </draw:image>
          <svg:desc>preencoded.png</svg:desc>
        </draw:frame>
        <draw:custom-shape draw:name="Text 1" draw:style-name="gr182" draw:text-style-name="P7" draw:layer="layout" svg:width="15.239cm" svg:height="2.158cm" svg:x="2.794cm" svg:y="0.305cm">
          <text:p text:style-name="P6"><text:span text:style-name="T7">Reliability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3" draw:text-style-name="P5" draw:layer="layout" svg:width="2.285cm" svg:height="2.285cm" svg:x="22.352cm" svg:y="0.254cm">
          <text:p text:style-name="P4"><text:span text:style-name="T8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84" draw:text-style-name="P7" draw:layer="layout" svg:width="11.429cm" svg:height="1.015cm" svg:x="0.762cm" svg:y="3.048cm">
          <text:p text:style-name="P6"><text:span text:style-name="T47">Rủi Ro &amp; Kiểm Soá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19" draw:text-style-name="P32" draw:layer="layout" svg:width="11.429cm" svg:height="1.929cm" svg:x="0.762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812cm" svg:height="0.812cm" svg:x="1.067cm" svg:y="4.826cm">
          <draw:image xlink:href="Pictures/100000010000010000000100433D5215.png" xlink:type="simple" xlink:show="embed" xlink:actuate="onLoad" draw:mime-type="image/png">
            <text:p/>
          </draw:image>
          <svg:desc>preencoded.png</svg:desc>
        </draw:frame>
        <draw:custom-shape draw:name="Text 5" draw:style-name="gr185" draw:text-style-name="P7" draw:layer="layout" svg:width="9.905cm" svg:height="0.761cm" svg:x="2.083cm" svg:y="4.445cm">
          <text:p text:style-name="P6"><text:span text:style-name="T42">Hallucination / Query s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86" draw:text-style-name="P7" draw:layer="layout" svg:width="9.905cm" svg:height="0.888cm" svg:x="2.083cm" svg:y="5.232cm">
          <text:p text:style-name="P6"><text:span text:style-name="T48">Human-in-the-loop review + golden dataset test hàng tuầ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19" draw:text-style-name="P32" draw:layer="layout" svg:width="11.429cm" svg:height="1.929cm" svg:x="0.762cm" svg:y="6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812cm" svg:height="0.812cm" svg:x="1.067cm" svg:y="6.96cm">
          <draw:image xlink:href="Pictures/100000010000010000000100AF82A5C8.png" xlink:type="simple" xlink:show="embed" xlink:actuate="onLoad" draw:mime-type="image/png">
            <text:p/>
          </draw:image>
          <svg:desc>preencoded.png</svg:desc>
        </draw:frame>
        <draw:custom-shape draw:name="Text 8" draw:style-name="gr187" draw:text-style-name="P7" draw:layer="layout" svg:width="9.905cm" svg:height="0.761cm" svg:x="2.083cm" svg:y="6.579cm">
          <text:p text:style-name="P6"><text:span text:style-name="T42">API nguồn thay đổi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88" draw:text-style-name="P7" draw:layer="layout" svg:width="9.905cm" svg:height="0.888cm" svg:x="2.083cm" svg:y="7.366cm">
          <text:p text:style-name="P6"><text:span text:style-name="T48">Schema versioning + tự động detect field mis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19" draw:text-style-name="P32" draw:layer="layout" svg:width="11.429cm" svg:height="1.929cm" svg:x="0.762cm" svg:y="8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812cm" svg:height="0.812cm" svg:x="1.067cm" svg:y="9.093cm">
          <draw:image xlink:href="Pictures/100000010000010000000100C1B66118.png" xlink:type="simple" xlink:show="embed" xlink:actuate="onLoad" draw:mime-type="image/png">
            <text:p/>
          </draw:image>
          <svg:desc>preencoded.png</svg:desc>
        </draw:frame>
        <draw:custom-shape draw:name="Text 11" draw:style-name="gr189" draw:text-style-name="P7" draw:layer="layout" svg:width="9.905cm" svg:height="0.761cm" svg:x="2.083cm" svg:y="8.712cm">
          <text:p text:style-name="P6"><text:span text:style-name="T42">Data leak / quyền truy cậ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0" draw:text-style-name="P7" draw:layer="layout" svg:width="9.905cm" svg:height="0.888cm" svg:x="2.083cm" svg:y="9.5cm">
          <text:p text:style-name="P6"><text:span text:style-name="T48">RBAC theo phòng ban, audit log, encrypt at 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9" draw:text-style-name="P32" draw:layer="layout" svg:width="11.429cm" svg:height="1.929cm" svg:x="0.762cm" svg:y="10.7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812cm" svg:height="0.812cm" svg:x="1.067cm" svg:y="11.227cm">
          <draw:image xlink:href="Pictures/1000000100000100000001006A8F28B7.png" xlink:type="simple" xlink:show="embed" xlink:actuate="onLoad" draw:mime-type="image/png">
            <text:p/>
          </draw:image>
          <svg:desc>preencoded.png</svg:desc>
        </draw:frame>
        <draw:custom-shape draw:name="Text 14" draw:style-name="gr191" draw:text-style-name="P7" draw:layer="layout" svg:width="9.905cm" svg:height="0.761cm" svg:x="2.083cm" svg:y="10.846cm">
          <text:p text:style-name="P6"><text:span text:style-name="T42">Downtime / lỗi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92" draw:text-style-name="P7" draw:layer="layout" svg:width="9.905cm" svg:height="0.888cm" svg:x="2.083cm" svg:y="11.633cm">
          <text:p text:style-name="P6"><text:span text:style-name="T48">Dead-letter queue, retry logic, alerting Slack/PagerDu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3" draw:text-style-name="P7" draw:layer="layout" svg:width="11.429cm" svg:height="1.015cm" svg:x="13.208cm" svg:y="3.048cm">
          <text:p text:style-name="P6"><text:span text:style-name="T47">MLOps Cad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1" draw:text-style-name="P15" draw:layer="layout" svg:width="11.429cm" svg:height="1.929cm" svg:x="13.208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2.539cm" svg:height="1.929cm" svg:x="13.208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94" draw:text-style-name="P5" draw:layer="layout" svg:width="2.539cm" svg:height="1.929cm" svg:x="13.208cm" svg:y="4.318cm">
          <text:p text:style-name="P4"><text:span text:style-name="T49">Da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95" draw:text-style-name="P7" draw:layer="layout" svg:width="8.381cm" svg:height="1.472cm" svg:x="16.002cm" svg:y="4.572cm">
          <text:p text:style-name="P6"><text:span text:style-name="T50">Monitor query accuracy &amp; latency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6" draw:text-style-name="P24" draw:layer="layout" svg:width="11.429cm" svg:height="1.929cm" svg:x="13.208cm" svg:y="6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" draw:text-style-name="P13" draw:layer="layout" svg:width="2.539cm" svg:height="1.929cm" svg:x="13.208cm" svg:y="6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96" draw:text-style-name="P5" draw:layer="layout" svg:width="2.539cm" svg:height="1.929cm" svg:x="13.208cm" svg:y="6.452cm">
          <text:p text:style-name="P4"><text:span text:style-name="T49">Week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97" draw:text-style-name="P7" draw:layer="layout" svg:width="8.381cm" svg:height="1.472cm" svg:x="16.002cm" svg:y="6.706cm">
          <text:p text:style-name="P6"><text:span text:style-name="T51">Review error logs, cập nhật schema mapping mớ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98" draw:text-style-name="P38" draw:layer="layout" svg:width="11.429cm" svg:height="1.929cm" svg:x="13.208cm" svg:y="8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4" draw:text-style-name="P13" draw:layer="layout" svg:width="2.539cm" svg:height="1.929cm" svg:x="13.208cm" svg:y="8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99" draw:text-style-name="P5" draw:layer="layout" svg:width="2.539cm" svg:height="1.929cm" svg:x="13.208cm" svg:y="8.585cm">
          <text:p text:style-name="P4"><text:span text:style-name="T49">Month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00" draw:text-style-name="P7" draw:layer="layout" svg:width="8.381cm" svg:height="1.472cm" svg:x="16.002cm" svg:y="8.839cm">
          <text:p text:style-name="P6"><text:span text:style-name="T52">Retrain prompt templates, benchmark model mớ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01" draw:text-style-name="P39" draw:layer="layout" svg:width="11.429cm" svg:height="1.929cm" svg:x="13.208cm" svg:y="10.7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4" draw:text-style-name="P13" draw:layer="layout" svg:width="2.539cm" svg:height="1.929cm" svg:x="13.208cm" svg:y="10.7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02" draw:text-style-name="P5" draw:layer="layout" svg:width="2.539cm" svg:height="1.929cm" svg:x="13.208cm" svg:y="10.719cm">
          <text:p text:style-name="P4"><text:span text:style-name="T49">Quarter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03" draw:text-style-name="P7" draw:layer="layout" svg:width="8.381cm" svg:height="1.472cm" svg:x="16.002cm" svg:y="10.973cm">
          <text:p text:style-name="P6"><text:span text:style-name="T53">Full audit: cost, data quality, user feed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04" draw:text-style-name="P7" draw:layer="layout" svg:width="23.875cm" svg:height="0.634cm" svg:x="0.762cm" svg:y="13.665cm">
          <text:p text:style-name="P6"><text:span text:style-name="T14">Vincom Retail <text:s/>· <text:s/>AI Data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05" draw:text-style-name="P9" draw:layer="layout" svg:width="3.047cm" svg:height="0.634cm" svg:x="21.59cm" svg:y="13.665cm">
          <text:p text:style-name="P8"><text:span text:style-name="T14">7 /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7" presentation:class="page"/>
          <draw:frame draw:name="Notes Placeholder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ncom Retail – AI Data Agent</dc:title>
    <dc:subject>PptxGenJS Presentation</dc:subject>
    <meta:initial-creator>PptxGenJS</meta:initial-creator>
    <meta:editing-cycles>2</meta:editing-cycles>
    <meta:creation-date>2026-04-22T10:13:04</meta:creation-date>
    <dc:date>2026-04-22T17:28:18.095056762</dc:date>
    <meta:editing-duration>PT42S</meta:editing-duration>
    <meta:generator>LibreOffice/24.2.7.2$Linux_X86_64 LibreOffice_project/420$Build-2</meta:generator>
    <meta:document-statistic meta:object-count="374"/>
    <meta:user-defined meta:name="AppVersion">16.0000</meta:user-defined>
    <meta:user-defined meta:name="Company">PptxGenJS</meta:user-defined>
    <meta:user-defined meta:name="Notes" meta:value-type="float">7</meta:user-defined>
    <meta:user-defined meta:name="PresentationFormat">On-screen Show (16:9)</meta:user-defined>
    <meta:user-defined meta:name="Slides" meta:value-type="float">7</meta:user-defined>
  </office:meta>
</office:document-meta>
</file>